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paragraph-properties fo:margin-left="0cm" fo:margin-right="1cm" fo:text-indent="0cm" style:auto-text-indent="false"/>
      <style:text-properties fo:font-size="16pt" officeooo:paragraph-rsid="00136c1a" style:font-size-asian="16pt" style:font-size-complex="16pt"/>
    </style:style>
    <style:style style:name="P2" style:family="paragraph" style:parent-style-name="Standard">
      <style:text-properties fo:font-size="16pt" officeooo:paragraph-rsid="00136c1a" style:font-size-asian="16pt" style:font-size-complex="16pt"/>
    </style:style>
    <style:style style:name="P3" style:family="paragraph" style:parent-style-name="Text_20_body">
      <style:text-properties fo:font-size="16pt" officeooo:paragraph-rsid="00136c1a" style:font-size-asian="16pt" style:font-size-complex="16pt"/>
    </style:style>
    <style:style style:name="P4" style:family="paragraph" style:parent-style-name="Text_20_body">
      <style:text-properties fo:font-size="16pt" officeooo:rsid="0017041c" officeooo:paragraph-rsid="001490e2" style:font-size-asian="16pt" style:font-size-complex="16pt"/>
    </style:style>
    <style:style style:name="P5" style:family="paragraph" style:parent-style-name="Standard">
      <style:text-properties fo:font-size="16pt" fo:font-weight="bold" officeooo:paragraph-rsid="00136c1a" style:font-size-asian="16pt" style:font-weight-asian="bold" style:font-size-complex="16pt" style:font-weight-complex="bold"/>
    </style:style>
    <style:style style:name="P6" style:family="paragraph" style:parent-style-name="Text_20_body">
      <style:text-properties officeooo:paragraph-rsid="00136c1a"/>
    </style:style>
    <style:style style:name="P7" style:family="paragraph" style:parent-style-name="Heading_20_2">
      <style:text-properties fo:font-size="16pt" officeooo:paragraph-rsid="00136c1a" style:font-size-asian="16pt" style:font-size-complex="16pt"/>
    </style:style>
    <style:style style:name="P8" style:family="paragraph" style:parent-style-name="Text_20_body" style:list-style-name="L1">
      <style:text-properties fo:font-size="16pt" officeooo:paragraph-rsid="00136c1a" style:font-size-asian="16pt" style:font-size-complex="16pt"/>
    </style:style>
    <style:style style:name="T1" style:family="text">
      <style:text-properties officeooo:rsid="0017041c"/>
    </style:style>
    <style:style style:name="T2" style:family="text">
      <style:text-properties fo:font-size="16pt" style:font-size-asian="16pt" style:font-size-complex="16pt"/>
    </style:style>
    <style:style style:name="T3" style:family="text">
      <style:text-properties officeooo:rsid="001490e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5">Specialist Mathematical Development Programme – <text:span text:style-name="T3">Gold Package</text:span></text:p>
      <text:p text:style-name="P2"/>
      <text:p text:style-name="P2">A structured, specialist pathway designed to support learners who need a more thoughtful and carefully paced approach to learning mathematics.</text:p>
      <text:p text:style-name="P2"/>
      <text:p text:style-name="P2">This programme is designed for learners who need more than traditional tutoring. Rather than focusing solely on curriculum coverage or short-term outcomes, the work centres on confidence, thinking processes and the gradual development of mathematical understanding over time.</text:p>
      <text:p text:style-name="P2"/>
      <text:p text:style-name="P2">Support is delivered through a phased model. The intensity of work is greatest at the beginning, when careful assessment and structured planning are most important. As confidence and independence develop, the level of support gradually reduces.</text:p>
      <text:p text:style-name="P2"/>
      <text:p text:style-name="P2">Many students who experience learning difficulties find long sessions exhausting. Shorter, more frequent sessions allow us to work intensively while maintaining focus, engagement and confidence. Sessions are therefore typically 25–40 minutes in length.</text:p>
      <text:p text:style-name="P2"/>
      <text:p text:style-name="P2">Progress also depends on what happens between sessions. Learners are encouraged to practise new approaches, reflect on strategies introduced during sessions and gradually apply their understanding more independently. This combination of guided support and structured consolidation helps build confidence and greater ease with mathematics over time.</text:p>
      <text:p text:style-name="P2"/>
      <text:p text:style-name="P2">Who this programme is for</text:p>
      <text:p text:style-name="P2"/>
      <text:p text:style-name="P2">This programme is particularly suited to learners who:</text:p>
      <text:p text:style-name="P2"/>
      <text:p text:style-name="P2">find mathematics persistently difficult or overwhelming</text:p>
      <text:p text:style-name="P2"/>
      <text:p text:style-name="P2">have lost confidence in their ability to succeed in maths</text:p>
      <text:p text:style-name="P2"/>
      <text:p text:style-name="P2">struggle with the pace or structure of classroom mathematics</text:p>
      <text:p text:style-name="P2"/>
      <text:p text:style-name="P2"><text:soft-page-break/>benefit from a slower, more carefully paced learning environment</text:p>
      <text:p text:style-name="P2"/>
      <text:p text:style-name="P2">find long sessions exhausting and respond better to shorter, more frequent sessions</text:p>
      <text:p text:style-name="P2"/>
      <text:p text:style-name="P2">It may also be appropriate for learners whose processing differences, attention difficulties or working memory challenges make traditional tutoring less effective.</text:p>
      <text:p text:style-name="P2"/>
      <text:p text:style-name="P2">The programme works best for families seeking thoughtful, structured support over time rather than short-term revision or rapid exam preparation.</text:p>
      <text:p text:style-name="P2"/>
      <text:p text:style-name="P5">How the Programme Works</text:p>
      <text:p text:style-name="P2"/>
      <text:p text:style-name="P2">Support is delivered through three structured stages. Each stage reflects a different phase of the learner’s development, beginning with careful diagnostic work and gradually moving towards increasing independence.</text:p>
      <text:p text:style-name="P2"/>
      <text:p text:style-name="P2">Movement between stages depends on the learner’s progress and readiness. Some learners may spend longer in a particular phase depending on their individual needs.</text:p>
      <text:p text:style-name="P2"/>
      <text:p text:style-name="P5">Stage 1 – Diagnostic &amp; Foundations</text:p>
      <text:p text:style-name="P2"/>
      <text:p text:style-name="P2">Duration: One month</text:p>
      <text:p text:style-name="P2"/>
      <text:p text:style-name="P2">The first stage focuses on building a clear understanding of the learner’s relationship with mathematics and establishing strong foundations for future progress.</text:p>
      <text:p text:style-name="P2"/>
      <text:p text:style-name="P2">This is an intensive diagnostic month. It allows time to understand how the learner approaches mathematical tasks, identify barriers to understanding and begin rebuilding confidence in a thoughtful and supportive way.</text:p>
      <text:p text:style-name="P2"/>
      <text:p text:style-name="P2">This stage may include</text:p>
      <text:p text:style-name="P2"/>
      <text:p text:style-name="P2">diagnostic mathematical assessment</text:p>
      <text:p text:style-name="P2"/>
      <text:p text:style-name="P2"><text:soft-page-break/>exploration of learning patterns and barriers</text:p>
      <text:p text:style-name="P2"/>
      <text:p text:style-name="P2">identification of cognitive load and processing challenges</text:p>
      <text:p text:style-name="P2"/>
      <text:p text:style-name="P2">establishing effective learning routines</text:p>
      <text:p text:style-name="P2"/>
      <text:p text:style-name="P2">early confidence-building work</text:p>
      <text:p text:style-name="P2"/>
      <text:p text:style-name="P2">parent consultation and discussion of learning priorities</text:p>
      <text:p text:style-name="P2"/>
      <text:p text:style-name="P2">Session structure</text:p>
      <text:p text:style-name="P2"/>
      <text:p text:style-name="P2">Up to five individual sessions per week, each 25–40 minutes, typically scheduled across the week to support concentration and reduce cognitive overload.</text:p>
      <text:p text:style-name="P2"/>
      <text:p text:style-name="P2">This stage is intentionally intensive, as careful assessment and thoughtful planning are essential for meaningful progress.</text:p>
      <text:p text:style-name="P2"/>
      <text:p text:style-name="P5">Stage 2 – Development Phase</text:p>
      <text:p text:style-name="P2"/>
      <text:p text:style-name="P2">Once the learner’s needs and learning profile are better understood, support moves into a more sustained development phase.</text:p>
      <text:p text:style-name="P2"/>
      <text:p text:style-name="P2">The focus during this stage is on gradually rebuilding mathematical understanding while strengthening confidence, consistency and engagement with learning.</text:p>
      <text:p text:style-name="P2"/>
      <text:p text:style-name="P2">This stage may include</text:p>
      <text:p text:style-name="P2"/>
      <text:p text:style-name="P2">continued 1:1 online sessions</text:p>
      <text:p text:style-name="P2"/>
      <text:p text:style-name="P2">development of conceptual understanding</text:p>
      <text:p text:style-name="P2"/>
      <text:p text:style-name="P2">personalised learning strategies</text:p>
      <text:p text:style-name="P2"/>
      <text:p text:style-name="P2">structured mathematical practice</text:p>
      <text:p text:style-name="P2"/>
      <text:p text:style-name="P2">ongoing review and adaptation of support</text:p>
      <text:p text:style-name="P2"><text:soft-page-break/></text:p>
      <text:p text:style-name="P2">Session structure</text:p>
      <text:p text:style-name="P2"/>
      <text:p text:style-name="P2">Up to three individual sessions per week, each 25–40 minutes, allowing time between sessions for consolidation and independent practice.</text:p>
      <text:p text:style-name="P2"/>
      <text:p text:style-name="P2">This phase may continue for several months depending on the learner’s needs and progress.</text:p>
      <text:p text:style-name="P2"/>
      <text:p text:style-name="P5">Stage 3 – Consolidation Phase</text:p>
      <text:p text:style-name="P2"/>
      <text:p text:style-name="P2"/>
      <text:p text:style-name="P2">As understanding and confidence become more secure, support moves into a consolidation phase.</text:p>
      <text:p text:style-name="P2"/>
      <text:p text:style-name="P2">The aim at this stage is to strengthen independence while ensuring progress remains stable and sustainable.</text:p>
      <text:p text:style-name="P2"/>
      <text:p text:style-name="P2">This stage may include</text:p>
      <text:p text:style-name="P2"/>
      <text:p text:style-name="P2">continued 1:1 sessions at a reduced intensity</text:p>
      <text:p text:style-name="P2"/>
      <text:p text:style-name="P2">consolidation of key mathematical ideas</text:p>
      <text:p text:style-name="P2"/>
      <text:p text:style-name="P2">support with school assessments where appropriate</text:p>
      <text:p text:style-name="P2"/>
      <text:p text:style-name="P2">development of independent learning habits</text:p>
      <text:p text:style-name="P2"/>
      <text:p text:style-name="P2">Session structure</text:p>
      <text:p text:style-name="P2"/>
      <text:p text:style-name="P2">Up to two individual sessions per week, each 25–40 minutes, providing continued guidance while gradually reducing reliance on structured support.</text:p>
      <text:p text:style-name="P2"/>
      <text:p text:style-name="P5">Academic assessments</text:p>
      <text:p text:style-name="P5"/>
      <text:p text:style-name="P2">Where appropriate, sessions may also include support with school assessments or examinations. The central aim of the programme, however, <text:soft-page-break/>is to build secure mathematical understanding and lasting confidence in learning.</text:p>
      <text:p text:style-name="P2"/>
      <text:p text:style-name="P1">The consolidation phase does not mean support is being withdrawn. Rather, it reflects that the learner is becoming more confident and able to work more independently. Progress continues to be monitored carefully, and if additional support becomes necessary, the level of consultations can be adjusted to ensure the learner remains well supported.</text:p>
      <text:p text:style-name="P1">If a learner encounters new challenges or a period of increased academic demand, it is always possible to temporarily increase the level of support.</text:p>
      <text:h text:style-name="P7" text:outline-level="2">When does a learner move from Stage 2 to Stage 3? </text:h>
      <text:p text:style-name="P3">Movement between stages is based on the learner’s readiness rather than a fixed timetable. Progress is reviewed regularly to ensure the level of support remains appropriate.</text:p>
      <text:p text:style-name="P3">A transition to Stage 3 is usually considered when <text:span text:style-name="T1">all </text:span><text:s/>of the following are evident:</text:p>
      <text:list text:style-name="L1">
        <text:list-item>
          <text:p text:style-name="P8">the learner approaches mathematical tasks with greater confidence and reduced anxiety</text:p>
        </text:list-item>
        <text:list-item>
          <text:p text:style-name="P8">core mathematical ideas previously studied are becoming more secure</text:p>
        </text:list-item>
        <text:list-item>
          <text:p text:style-name="P8">the learner is increasingly able to attempt problems independently</text:p>
        </text:list-item>
        <text:list-item>
          <text:p text:style-name="P8">fewer prompts or explanations are required during consultations</text:p>
        </text:list-item>
        <text:list-item>
          <text:p text:style-name="P8">the learner is able to sustain focus without becoming quickly overwhelmed</text:p>
        </text:list-item>
      </text:list>
      <text:p text:style-name="P3">When these indicators begin to appear consistently, the level of support can gradually reduce while continuing to monitor progress carefully.</text:p>
      <text:p text:style-name="P6"><text:span text:style-name="T2">The aim of Stage 3 is to </text:span><text:span text:style-name="Strong_20_Emphasis"><text:span text:style-name="T2">support independence while maintaining stability in learning</text:span></text:span><text:span text:style-name="T2">.</text:span></text:p>
      <text:p text:style-name="P1"><text:soft-page-break/>Progress is reviewed approximately every 6–8 weeks to consider whether the current level of support remains appropriate.</text:p>
      <text:p text:style-name="P1">The consolidation phase does not mean support is being withdrawn. Rather, it reflects that the learner is becoming more confident and able to work more independently. Progress continues to be monitored carefully, and if additional support becomes necessary, the level of consultations can be adjusted to ensure the learner remains well supported.</text:p>
      <text:p text:style-name="P1">If a learner encounters new challenges or a period of increased academic demand, it is always possible to temporarily increase the level of support.</text:p>
      <text:p text:style-name="P3"/>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5T09:52:25.874775037</meta:creation-date>
    <dc:date>2026-05-01T09:34:07.028072461</dc:date>
    <meta:editing-duration>P1DT2H40M54S</meta:editing-duration>
    <meta:editing-cycles>5</meta:editing-cycles>
    <meta:generator>LibreOffice/7.4.7.2$Linux_X86_64 LibreOffice_project/40$Build-2</meta:generator>
    <meta:document-statistic meta:table-count="0" meta:image-count="0" meta:object-count="0" meta:page-count="6" meta:paragraph-count="71" meta:word-count="997" meta:character-count="7004" meta:non-whitespace-character-count="6082"/>
  </office:meta>
</office:document-meta>
</file>